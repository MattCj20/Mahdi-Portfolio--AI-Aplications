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T1" style:family="text">
      <style:text-properties officeooo:rsid="001f5a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02 Recent Advancements and Future Trends in AI</text:h>
      <text:h text:style-name="Heading_20_2" text:outline-level="2">ITAI 2372</text:h>
      <text:p text:style-name="Text_20_body"><text:span text:style-name="Strong_20_Emphasis">Student Name:</text:span> Mahdi <text:span text:style-name="T1">Mohammadkhani</text:span><text:line-break/><text:span text:style-name="Strong_20_Emphasis">Submission Date:</text:span> 19 February 2026</text:p>
      <text:p text:style-name="Horizontal_20_Line"/>
      <text:h text:style-name="Heading_20_1" text:outline-level="1">Introduction</text:h>
      <text:p text:style-name="Text_20_body">Artificial Intelligence (AI) is transforming industries, governments, and societies worldwide. Recent advancements in generative AI, robotics, smart cities, and space exploration are reshaping the global economy. This assignment discusses key developments, emerging technologies such as AGI, industry trends, and legal and ethical considerations.</text:p>
      <text:p text:style-name="Horizontal_20_Line"/>
      <text:h text:style-name="Heading_20_1" text:outline-level="1">1. Recent Advancements in Artificial Intelligence</text:h>
      <text:h text:style-name="Heading_20_2" text:outline-level="2">1.1 Generative AI and Foundation Models</text:h>
      <text:p text:style-name="Text_20_body">Generative AI systems can create text, images, code, and audio. These systems are trained on large datasets and function as foundation models.</text:p>
      <text:p text:style-name="Text_20_body">Applications include:</text:p>
      <text:list text:style-name="L1">
        <text:list-item>
          <text:p text:style-name="P1">Content creation</text:p>
        </text:list-item>
        <text:list-item>
          <text:p text:style-name="P1">Code generation</text:p>
        </text:list-item>
        <text:list-item>
          <text:p text:style-name="P1">Virtual assistants</text:p>
        </text:list-item>
        <text:list-item>
          <text:p text:style-name="P1">Research automation</text:p>
        </text:list-item>
      </text:list>
      <text:p text:style-name="Text_20_body">This represents a shift from narrow AI systems to general-purpose intelligent systems.</text:p>
      <text:p text:style-name="Horizontal_20_Line"/>
      <text:h text:style-name="Heading_20_2" text:outline-level="2">1.2 Multimodal AI</text:h>
      <text:p text:style-name="Text_20_body">Multimodal AI processes text, images, audio, and video simultaneously.</text:p>
      <text:p text:style-name="Text_20_body">Applications:</text:p>
      <text:list text:style-name="L2">
        <text:list-item>
          <text:p text:style-name="P2"><text:soft-page-break/>Medical imaging</text:p>
        </text:list-item>
        <text:list-item>
          <text:p text:style-name="P2">Autonomous vehicles</text:p>
        </text:list-item>
        <text:list-item>
          <text:p text:style-name="P2">Robotics</text:p>
        </text:list-item>
        <text:list-item>
          <text:p text:style-name="P2">Smart assistants</text:p>
        </text:list-item>
      </text:list>
      <text:p text:style-name="Horizontal_20_Line"/>
      <text:h text:style-name="Heading_20_2" text:outline-level="2">1.3 AI in Robotics and Automation</text:h>
      <text:p text:style-name="Text_20_body">AI enhances automation in:</text:p>
      <text:list text:style-name="L3">
        <text:list-item>
          <text:p text:style-name="P3">Manufacturing</text:p>
        </text:list-item>
        <text:list-item>
          <text:p text:style-name="P3">Warehousing</text:p>
        </text:list-item>
        <text:list-item>
          <text:p text:style-name="P3">Healthcare</text:p>
        </text:list-item>
        <text:list-item>
          <text:p text:style-name="P3">Transportation</text:p>
        </text:list-item>
      </text:list>
      <text:p text:style-name="Text_20_body">Autonomous systems improve efficiency, reduce human error, and increase productivity.</text:p>
      <text:p text:style-name="Horizontal_20_Line"/>
      <text:h text:style-name="Heading_20_2" text:outline-level="2">1.4 AI in Space Exploration</text:h>
      <text:p text:style-name="Text_20_body">AI is used for:</text:p>
      <text:list text:style-name="L4">
        <text:list-item>
          <text:p text:style-name="P4">Autonomous spacecraft navigation</text:p>
        </text:list-item>
        <text:list-item>
          <text:p text:style-name="P4">Satellite image analysis</text:p>
        </text:list-item>
        <text:list-item>
          <text:p text:style-name="P4">Planetary mapping</text:p>
        </text:list-item>
        <text:list-item>
          <text:p text:style-name="P4">Rocket landing optimization</text:p>
        </text:list-item>
      </text:list>
      <text:p text:style-name="Text_20_body">AI reduces mission risk and enables deep-space exploration.</text:p>
      <text:p text:style-name="Horizontal_20_Line"/>
      <text:h text:style-name="Heading_20_1" text:outline-level="1">2. Artificial General Intelligence (AGI)</text:h>
      <text:h text:style-name="Heading_20_2" text:outline-level="2">Definition</text:h>
      <text:p text:style-name="Text_20_body">Artificial General Intelligence (AGI) refers to AI systems capable of performing any intellectual task that a human can perform.</text:p>
      <text:h text:style-name="Heading_20_2" text:outline-level="2">Key Characteristics</text:h>
      <text:list text:style-name="L5">
        <text:list-item>
          <text:p text:style-name="P5">General reasoning</text:p>
        </text:list-item>
        <text:list-item>
          <text:p text:style-name="P5"><text:soft-page-break/>Cross-domain learning</text:p>
        </text:list-item>
        <text:list-item>
          <text:p text:style-name="P5">Adaptability</text:p>
        </text:list-item>
        <text:list-item>
          <text:p text:style-name="P5">Long-term planning</text:p>
        </text:list-item>
      </text:list>
      <text:p text:style-name="Text_20_body">AGI remains under research and presents both opportunities and safety challenges.</text:p>
      <text:p text:style-name="Horizontal_20_Line"/>
      <text:h text:style-name="Heading_20_1" text:outline-level="1">3. Key Industry Trends in AI (2025 and Beyond)</text:h>
      <text:h text:style-name="Heading_20_2" text:outline-level="2">3.1 AI Democratization</text:h>
      <text:list text:style-name="L6">
        <text:list-item>
          <text:p text:style-name="P6">No-code AI platforms</text:p>
        </text:list-item>
        <text:list-item>
          <text:p text:style-name="P6">AI tools accessible to small businesses</text:p>
        </text:list-item>
        <text:list-item>
          <text:p text:style-name="P6">AI-powered productivity systems</text:p>
        </text:list-item>
      </text:list>
      <text:h text:style-name="Heading_20_2" text:outline-level="2">3.2 AI and Cloud Computing</text:h>
      <text:list text:style-name="L7">
        <text:list-item>
          <text:p text:style-name="P7">AI-as-a-Service (AIaaS)</text:p>
        </text:list-item>
        <text:list-item>
          <text:p text:style-name="P7">Scalable AI deployment</text:p>
        </text:list-item>
        <text:list-item>
          <text:p text:style-name="P7">Integration into enterprise systems</text:p>
        </text:list-item>
      </text:list>
      <text:h text:style-name="Heading_20_2" text:outline-level="2">3.3 AI in Healthcare</text:h>
      <text:list text:style-name="L8">
        <text:list-item>
          <text:p text:style-name="P8">Early disease detection</text:p>
        </text:list-item>
        <text:list-item>
          <text:p text:style-name="P8">Drug discovery</text:p>
        </text:list-item>
        <text:list-item>
          <text:p text:style-name="P8">Personalized medicine</text:p>
        </text:list-item>
      </text:list>
      <text:h text:style-name="Heading_20_2" text:outline-level="2">3.4 AI in Finance</text:h>
      <text:list text:style-name="L9">
        <text:list-item>
          <text:p text:style-name="P9">Fraud detection</text:p>
        </text:list-item>
        <text:list-item>
          <text:p text:style-name="P9">Risk analysis</text:p>
        </text:list-item>
        <text:list-item>
          <text:p text:style-name="P9">Algorithmic trading</text:p>
        </text:list-item>
      </text:list>
      <text:h text:style-name="Heading_20_2" text:outline-level="2">3.5 Edge AI</text:h>
      <text:list text:style-name="L10">
        <text:list-item>
          <text:p text:style-name="P10">On-device AI processing</text:p>
        </text:list-item>
        <text:list-item>
          <text:p text:style-name="P10">Reduced latency</text:p>
        </text:list-item>
        <text:list-item>
          <text:p text:style-name="P10">Improved data privacy</text:p>
        </text:list-item>
      </text:list>
      <text:p text:style-name="Horizontal_20_Line"><text:soft-page-break/></text:p>
      <text:h text:style-name="Heading_20_1" text:outline-level="1">4. Smart Cities and AI Integration</text:h>
      <text:h text:style-name="Heading_20_2" text:outline-level="2">Definition</text:h>
      <text:p text:style-name="Text_20_body">A smart city uses AI, IoT, and big data to improve:</text:p>
      <text:list text:style-name="L11">
        <text:list-item>
          <text:p text:style-name="P11">Traffic management</text:p>
        </text:list-item>
        <text:list-item>
          <text:p text:style-name="P11">Energy efficiency</text:p>
        </text:list-item>
        <text:list-item>
          <text:p text:style-name="P11">Waste management</text:p>
        </text:list-item>
        <text:list-item>
          <text:p text:style-name="P11">Public safety</text:p>
        </text:list-item>
      </text:list>
      <text:h text:style-name="Heading_20_2" text:outline-level="2">Applications</text:h>
      <text:list text:style-name="L12">
        <text:list-item>
          <text:p text:style-name="P12">Smart traffic lights</text:p>
        </text:list-item>
        <text:list-item>
          <text:p text:style-name="P12">Predictive infrastructure maintenance</text:p>
        </text:list-item>
        <text:list-item>
          <text:p text:style-name="P12">AI surveillance systems</text:p>
        </text:list-item>
        <text:list-item>
          <text:p text:style-name="P12">Smart energy grids</text:p>
        </text:list-item>
      </text:list>
      <text:p text:style-name="Text_20_body">Smart cities improve quality of life while optimizing resource usage.</text:p>
      <text:p text:style-name="Horizontal_20_Line"/>
      <text:h text:style-name="Heading_20_1" text:outline-level="1">5. Legal and Ethical Issues in AI</text:h>
      <text:h text:style-name="Heading_20_2" text:outline-level="2">5.1 Bias and Fairness</text:h>
      <text:p text:style-name="Text_20_body">AI systems may reflect bias in training data, leading to discrimination.</text:p>
      <text:h text:style-name="Heading_20_2" text:outline-level="2">5.2 Privacy Concerns</text:h>
      <text:list text:style-name="L13">
        <text:list-item>
          <text:p text:style-name="P13">Large-scale data collection</text:p>
        </text:list-item>
        <text:list-item>
          <text:p text:style-name="P13">Facial recognition systems</text:p>
        </text:list-item>
      </text:list>
      <text:h text:style-name="Heading_20_2" text:outline-level="2">5.3 Accountability</text:h>
      <text:p text:style-name="Text_20_body">Responsibility for AI-related harm may fall on developers, companies, or governments.</text:p>
      <text:h text:style-name="Heading_20_2" text:outline-level="2"><text:soft-page-break/>5.4 Intellectual Property</text:h>
      <text:p text:style-name="Text_20_body">Ownership of AI-generated content and training data copyright issues remain unresolved.</text:p>
      <text:h text:style-name="Heading_20_2" text:outline-level="2">5.5 AI Safety and Alignment</text:h>
      <text:p text:style-name="Text_20_body">Ensuring AI systems align with human values is critical to long-term safety.</text:p>
      <text:p text:style-name="Horizontal_20_Line"/>
      <text:h text:style-name="Heading_20_1" text:outline-level="1">6. Key Terms</text:h>
      <text:list text:style-name="L14">
        <text:list-item>
          <text:p text:style-name="P14">Artificial Intelligence (AI)</text:p>
        </text:list-item>
        <text:list-item>
          <text:p text:style-name="P14">Machine Learning (ML)</text:p>
        </text:list-item>
        <text:list-item>
          <text:p text:style-name="P14">Deep Learning</text:p>
        </text:list-item>
        <text:list-item>
          <text:p text:style-name="P14">Neural Networks</text:p>
        </text:list-item>
        <text:list-item>
          <text:p text:style-name="P14">Generative AI</text:p>
        </text:list-item>
        <text:list-item>
          <text:p text:style-name="P14">Foundation Models</text:p>
        </text:list-item>
        <text:list-item>
          <text:p text:style-name="P14">Artificial General Intelligence (AGI)</text:p>
        </text:list-item>
        <text:list-item>
          <text:p text:style-name="P14">Supervised Learning</text:p>
        </text:list-item>
        <text:list-item>
          <text:p text:style-name="P14">Unsupervised Learning</text:p>
        </text:list-item>
        <text:list-item>
          <text:p text:style-name="P14">Reinforcement Learning</text:p>
        </text:list-item>
        <text:list-item>
          <text:p text:style-name="P14">Natural Language Processing (NLP)</text:p>
        </text:list-item>
        <text:list-item>
          <text:p text:style-name="P14">Computer Vision</text:p>
        </text:list-item>
        <text:list-item>
          <text:p text:style-name="P14">Edge AI</text:p>
        </text:list-item>
        <text:list-item>
          <text:p text:style-name="P14">AI Ethics</text:p>
        </text:list-item>
        <text:list-item>
          <text:p text:style-name="P14">AI Governance</text:p>
        </text:list-item>
        <text:list-item>
          <text:p text:style-name="P14">Smart Cities</text:p>
        </text:list-item>
        <text:list-item>
          <text:p text:style-name="P14">Internet of Things (IoT)</text:p>
        </text:list-item>
        <text:list-item>
          <text:p text:style-name="P14">Big Data</text:p>
        </text:list-item>
        <text:list-item>
          <text:p text:style-name="P14">Algorithmic Bias</text:p>
        </text:list-item>
        <text:list-item>
          <text:p text:style-name="P14">Explainable AI (XAI)</text:p>
        </text:list-item>
      </text:list>
      <text:p text:style-name="Horizontal_20_Line"/>
      <text:h text:style-name="Heading_20_1" text:outline-level="1"><text:soft-page-break/>Conclusion</text:h>
      <text:p text:style-name="Text_20_body">Artificial Intelligence is rapidly transforming industries and societies. Emerging trends such as AGI, smart cities, robotics, and AI-driven space exploration demonstrate the expanding role of intelligent systems. While AI offers innovation and economic growth, it also raises ethical, legal, and governance challenges. Responsible development and regulation will determine the future impact of AI.</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06:49:15.995783000</meta:creation-date>
    <dc:date>2026-02-19T06:51:13.579448900</dc:date>
    <meta:editing-duration>PT1M58S</meta:editing-duration>
    <meta:editing-cycles>1</meta:editing-cycles>
    <meta:document-statistic meta:table-count="0" meta:image-count="0" meta:object-count="0" meta:page-count="6" meta:paragraph-count="113" meta:word-count="601" meta:character-count="3962" meta:non-whitespace-character-count="3539"/>
    <meta:generator>LibreOffice/25.2.7.2$Windows_X86_64 LibreOffice_project/5cbfd1ab6520636bb5f7b99185aa69bd7456825d</meta:generator>
  </office:meta>
</office:document-meta>
</file>